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5in" style:contextual-spacing="false" fo:line-height="115%"/>
      <style:text-properties fo:color="#000000" loext:opacity="100%" style:font-name="Times New Roman" fo:font-size="11pt" style:font-size-asian="11pt"/>
    </style:style>
    <style:style style:name="P2" style:family="paragraph" style:parent-style-name="Standard">
      <style:paragraph-properties fo:margin-top="0in" fo:margin-bottom="0.3335in" style:contextual-spacing="false" fo:text-align="center" style:justify-single-word="false"/>
      <style:text-properties fo:color="#000000" loext:opacity="100%" style:font-name="Times New Roman" fo:font-size="16pt" fo:font-weight="bold" style:font-size-asian="16pt" style:font-weight-asian="bold"/>
    </style:style>
    <style:style style:name="P3" style:family="paragraph" style:parent-style-name="Standard">
      <style:paragraph-properties fo:margin-top="0.25in" fo:margin-bottom="0.0835in" style:contextual-spacing="false" fo:keep-with-next="always"/>
      <style:text-properties fo:color="#000000" loext:opacity="100%" style:font-name="Times New Roman" fo:font-size="14pt" fo:font-weight="bold" style:font-size-asian="14pt" style:font-weight-asian="bold"/>
    </style:style>
    <style:style style:name="P4" style:family="paragraph" style:parent-style-name="Standard">
      <style:paragraph-properties fo:margin-top="0in" fo:margin-bottom="0.0835in" style:contextual-spacing="false" fo:line-height="115%" fo:text-align="justify" style:justify-single-word="false"/>
      <style:text-properties fo:color="#000000" loext:opacity="100%" style:font-name="Times New Roman" fo:font-size="12pt" style:font-size-asian="12pt"/>
    </style:style>
    <style:style style:name="P5" style:family="paragraph" style:parent-style-name="Standard">
      <style:paragraph-properties fo:margin-top="0in" fo:margin-bottom="0.0835in" style:contextual-spacing="false" fo:line-height="115%" fo:text-align="justify" style:justify-single-word="false"/>
      <style:text-properties fo:color="#000000" loext:opacity="100%" style:font-name="Times New Roman" fo:font-size="12pt" officeooo:paragraph-rsid="000d0295" style:font-size-asian="12pt"/>
    </style:style>
    <style:style style:name="P6" style:family="paragraph" style:parent-style-name="List_20_1" style:list-style-name="WWNum1">
      <style:paragraph-properties fo:margin-top="0in" fo:margin-bottom="0.0835in" style:contextual-spacing="true" fo:line-height="115%" fo:text-align="justify" style:justify-single-word="false"/>
      <style:text-properties fo:color="#000000" loext:opacity="100%" style:font-name="Times New Roman" fo:font-size="12pt" officeooo:paragraph-rsid="000d0295" style:font-size-asian="12pt"/>
    </style:style>
    <style:style style:name="P7" style:family="paragraph" style:parent-style-name="List_20_1" style:list-style-name="WWNum1">
      <style:paragraph-properties fo:margin-top="0in" fo:margin-bottom="0.0835in" style:contextual-spacing="true" fo:line-height="115%" fo:text-align="justify" style:justify-single-word="false"/>
      <style:text-properties fo:color="#000000" loext:opacity="100%" style:font-name="Times New Roman" fo:font-size="12pt" style:font-size-asian="12pt"/>
    </style:style>
    <style:style style:name="P8" style:family="paragraph" style:parent-style-name="Standard">
      <loext:graphic-properties draw:fill="solid" draw:fill-color="#f9f9f9"/>
      <style:paragraph-properties fo:margin-left="0.5in" fo:margin-top="0.0835in" fo:margin-bottom="0.1665in" style:contextual-spacing="false" fo:background-color="#f9f9f9" fo:padding-left="0.111in" fo:padding-right="0in" fo:padding-top="0in" fo:padding-bottom="0in" fo:border-left="1.5pt solid #777777" fo:border-right="none" fo:border-top="none" fo:border-bottom="none"/>
      <style:text-properties fo:color="#000000" loext:opacity="100%" style:font-name="Consolas" fo:font-size="11pt" style:font-size-asian="11pt"/>
    </style:style>
    <style:style style:name="P9" style:family="paragraph" style:parent-style-name="Standard">
      <loext:graphic-properties draw:fill="solid" draw:fill-color="#f9f9f9"/>
      <style:paragraph-properties fo:margin-left="0.5in" fo:margin-top="0.0555in" fo:margin-bottom="0.1665in" style:contextual-spacing="false" fo:background-color="#f9f9f9"/>
      <style:text-properties fo:color="#000000" loext:opacity="100%" style:font-name="Consolas" fo:font-size="11pt" fo:font-weight="bold" style:font-size-asian="11pt" style:font-weight-asian="bold"/>
    </style:style>
    <style:style style:name="P10" style:family="paragraph" style:parent-style-name="Standard">
      <style:paragraph-properties fo:margin-top="0in" fo:margin-bottom="0.0835in" style:contextual-spacing="false" fo:line-height="115%" fo:text-align="justify" style:justify-single-word="false"/>
      <style:text-properties fo:color="#000000" loext:opacity="100%" style:font-name="Times New Roman" fo:font-size="12pt" officeooo:paragraph-rsid="0011a8f7" style:font-size-asian="12pt"/>
    </style:style>
    <style:style style:name="P11" style:family="paragraph" style:parent-style-name="List_20_1" style:list-style-name="WWNum1">
      <style:paragraph-properties fo:margin-top="0in" fo:margin-bottom="0.0835in" style:contextual-spacing="true" fo:line-height="115%" fo:text-align="justify" style:justify-single-word="false"/>
    </style:style>
    <style:style style:name="P12" style:family="paragraph" style:parent-style-name="Standard">
      <style:paragraph-properties fo:margin-top="0.25in" fo:margin-bottom="0.0835in" style:contextual-spacing="false" fo:keep-with-next="always"/>
      <style:text-properties fo:color="#000000" loext:opacity="100%" style:font-name="Times New Roman" fo:font-size="12pt" fo:font-weight="bold" style:font-size-asian="12pt" style:font-weight-asian="bold"/>
    </style:style>
    <style:style style:name="T1" style:family="text">
      <style:text-properties officeooo:rsid="0011a8f7"/>
    </style:style>
    <style:style style:name="T2" style:family="text">
      <style:text-properties fo:color="#000000" loext:opacity="100%" style:font-name="Times New Roman" fo:font-size="12pt" style:font-size-asian="12pt"/>
    </style:style>
    <style:style style:name="T3" style:family="text">
      <style:text-properties fo:color="#000000" loext:opacity="100%" style:font-name="Times New Roman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e: Std. Cap. Ungureanu Alexandru – Mirel<text:line-break/>Grupa: C112 – A</text:p>
      <text:p text:style-name="P2">DOCUMENTAȚIE TEHNICĂ<text:line-break/>Sistem de Back-up &amp; Recovery </text:p>
      <text:p text:style-name="P3">1. Introducere</text:p>
      <text:p text:style-name="P4"><text:tab/>Sistemul de back-up &amp; recovery reprezintă un proiect constituit dintr-o serie de scripturi bash. Proiectul urmărește efectuarea backup-urilor într-un mod eficient, securizat, ce asigură și integritatea datelor prin generarea de sume de control (sha256sum). De asemenea, seria de scripturi oferă și opțiunea criptării datelor.</text:p>
      <text:p text:style-name="P3">2. Cerințe Preliminare (Prerequisites)</text:p>
      <text:p text:style-name="P5"><text:tab/>Pentru execuția corectă a seriilor de scripturi bash, mediul de execuție trebuie să dispună de următoarele utilitare standard Linux:</text:p>
      <text:list text:style-name="WWNum1">
        <text:list-item>
          <text:p text:style-name="P6">bash (interpretor comenzi)</text:p>
        </text:list-item>
        <text:list-item>
          <text:p text:style-name="P7">zip (compresia datelor în arhive)</text:p>
        </text:list-item>
        <text:list-item>
          <text:p text:style-name="P7">getfacl (folosit pentru extragerea metadatelor de tip ACL)</text:p>
        </text:list-item>
        <text:list-item>
          <text:p text:style-name="P7">openssl (folosit pentru criptarea datelor)</text:p>
        </text:list-item>
        <text:list-item>
          <text:p text:style-name="P7">utilitare standard din pachetul coreutils (stat, find, realpath etc.)</text:p>
        </text:list-item>
      </text:list>
      <text:p text:style-name="P3">3. Configurare și Permisiuni</text:p>
      <text:p text:style-name="P4"><text:tab/>Seria de scripturi bash, deși nu necesită o procedură complexă de configurare și rulează direct în locația sursă, necesită totuși acordarea drepturilor de execuție necesare pentru modulele proiectului. Aceste permisiuni se pot acorda rulând comanda:</text:p>
      <text:p text:style-name="P8">chmod u+x bin/main.bash lib/*.bash</text:p>
      <text:p text:style-name="P4"><text:tab/>Notă: Structura proiectului este una predefinită (bin și lib) și nu este recomandată modificarea ei! </text:p>
      <text:p text:style-name="P3">4. Mod de Utilizare</text:p>
      <text:p text:style-name="P4"><text:tab/>Seria de scripturi bash este operată exclusiv prin CLI (command line interface), iar comportamentul său este controlat prin intermediul argumentelor oferite de argument parser.</text:p>
      <text:p text:style-name="P9">Sintaxa de bază: ./main.bash &lt;opțiuni&gt;</text:p>
      <text:p text:style-name="P10">Următoarele opțiuni sunt obligatorii pentru <text:span text:style-name="T1">funcționarea scriptului:</text:span></text:p>
      <text:list text:continue-numbering="true" text:style-name="WWNum1">
        <text:list-item>
          <text:p text:style-name="P11"><text:soft-page-break/><text:span text:style-name="T2">-f/--file sau -d/--directory (pentru sursa datelor)</text:span></text:p>
        </text:list-item>
        <text:list-item>
          <text:p text:style-name="P7">-o/--output (pentru calea unde se pune arhiva)</text:p>
        </text:list-item>
      </text:list>
      <text:p text:style-name="P12">Parametri suportați de parser:</text:p>
      <text:list text:continue-numbering="true" text:style-name="WWNum1">
        <text:list-item>
          <text:p text:style-name="P11"><text:span text:style-name="T3">-f/--file &lt;cale&gt;</text:span><text:span text:style-name="T2"> : Specifică un fișier de configurare ce conține căile directoarelor țintă.</text:span></text:p>
        </text:list-item>
        <text:list-item>
          <text:p text:style-name="P11"><text:span text:style-name="T3">-d/--directory &lt;cale1&gt; &lt;cale2&gt;...</text:span><text:span text:style-name="T2"> : Specifică directoarele țintă pe care vrei să le salvezi.</text:span></text:p>
        </text:list-item>
        <text:list-item>
          <text:p text:style-name="P11"><text:span text:style-name="T3">-o/--output &lt;cale&gt;</text:span><text:span text:style-name="T2"> : Definește numele și calea arhivei destinație în care se salvează backup-ul.</text:span></text:p>
        </text:list-item>
        <text:list-item>
          <text:p text:style-name="P11"><text:span text:style-name="T3">-l/--log &lt;cale&gt;</text:span><text:span text:style-name="T2"> : Activează înregistrarea automată a evenimentelor în fișierul de log dorit.</text:span></text:p>
        </text:list-item>
        <text:list-item>
          <text:p text:style-name="P11"><text:span text:style-name="T3">-v/--verbose</text:span><text:span text:style-name="T2"> : Activează afișarea detaliată a procesului de backup direct pe ecran (modul verbose).</text:span></text:p>
        </text:list-item>
        <text:list-item>
          <text:p text:style-name="P11"><text:span text:style-name="T3">-b/--backup &amp; -e/--encrypt</text:span><text:span text:style-name="T2"> : Funcționalități de referențiere a unui backup existent și criptare cu OpenSSL (în curând).</text:span></text:p>
        </text:list-item>
      </text:list>
      <text:p text:style-name="P3">5. Arhitectura Proiectului</text:p>
      <text:p text:style-name="P4"><text:tab/>Proiectul este modularizat într-o serie de script-uri bash, fiecare având un rol critic în funcționarea stabilă și corectă a sistemului de backup:</text:p>
      <text:list text:continue-numbering="true" text:style-name="WWNum1">
        <text:list-item>
          <text:p text:style-name="P11"><text:span text:style-name="T3">main.bash</text:span><text:span text:style-name="T2"> : Reprezintă punctul principal de intrare. Gestionează fluxul execuției, parsarea argumentelor din CLI, crearea mediului temporar de lucru (.BAK_TMP_DATA) și controlează procesul de backup și post-backup.</text:span></text:p>
        </text:list-item>
        <text:list-item>
          <text:p text:style-name="P11"><text:span text:style-name="T3">utils.bash</text:span><text:span text:style-name="T2"> : Modulul utilitar. Asigură funcțiile necesare pentru validarea existenței directoarelor/fișierelor și verificarea permisiunilor de acces. De asemenea, se ocupă de uniformitatea mesajelor afișate în consolă (erori, atenționări, info).</text:span></text:p>
        </text:list-item>
        <text:list-item>
          <text:p text:style-name="P11"><text:span text:style-name="T3">logs.bash</text:span><text:span text:style-name="T2"> : Sistem de jurnalizare securizat. Formatează mesajele scrise în loguri și restricționează accesul la fișierul de log setându-i permisiuni de tip 600.</text:span></text:p>
        </text:list-item>
        <text:list-item>
          <text:p text:style-name="P11"><text:span text:style-name="T3">metadate.bash</text:span><text:span text:style-name="T2"> : Modulul responsabil cu extragerea metadatelor. Adună detalii despre fișiere (cale, proprietar, permisiuni, ACL-uri, timp de acces/creare/modificare și sumele sha256sum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0</meta:editing-cycles>
    <meta:creation-date>2013-12-23T23:15:00</meta:creation-date>
    <dc:date>2026-07-15T19:33:10.796524066</dc:date>
    <meta:editing-duration>PT9M30S</meta:editing-duration>
    <meta:generator>LibreOffice/25.8.7.3$Linux_X86_64 LibreOffice_project/580$Build-3</meta:generator>
    <meta:document-statistic meta:table-count="0" meta:image-count="0" meta:object-count="0" meta:page-count="2" meta:paragraph-count="34" meta:word-count="466" meta:character-count="3274" meta:non-whitespace-character-count="2859"/>
    <meta:user-defined meta:name="AppVersion">14.0000</meta:user-defined>
    <meta:template xlink:type="simple" xlink:actuate="onRequest" xlink:title="Normal.dotm" xlink:href=""/>
  </office:meta>
</office:document-meta>
</file>